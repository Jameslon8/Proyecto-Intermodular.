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2DA000001BAA87C960F.png" manifest:media-type="image/png"/>
  <manifest:file-entry manifest:full-path="Pictures/100000000000032000000190A84B367B.png" manifest:media-type="image/png"/>
  <manifest:file-entry manifest:full-path="Pictures/10000000000007800000043810A270F1.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master-page-name="First_20_Page">
      <style:paragraph-properties fo:text-align="center" style:justify-single-word="false" style:page-number="auto"/>
      <style:text-properties fo:font-size="18pt" fo:font-weight="bold" officeooo:rsid="000bacaa" officeooo:paragraph-rsid="000bacaa"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font-weight="bold" officeooo:rsid="000bacaa" officeooo:paragraph-rsid="000bacaa" style:font-size-asian="18pt" style:font-weight-asian="bold" style:font-size-complex="18pt" style:font-weight-complex="bold"/>
    </style:style>
    <style:style style:name="P3" style:family="paragraph" style:parent-style-name="Standard">
      <style:paragraph-properties fo:text-align="center" style:justify-single-word="false"/>
      <style:text-properties fo:color="#2a6099" loext:opacity="100%" fo:font-size="24pt" fo:font-weight="bold" officeooo:rsid="0015f7b8" officeooo:paragraph-rsid="0015f7b8" style:font-size-asian="24pt" style:font-weight-asian="bold" style:font-size-complex="24pt" style:font-weight-complex="bold"/>
    </style:style>
    <style:style style:name="P4" style:family="paragraph" style:parent-style-name="Standard">
      <style:paragraph-properties fo:break-before="page"/>
      <style:text-properties fo:font-size="18pt" fo:font-weight="bold" officeooo:rsid="0015f7b8" officeooo:paragraph-rsid="0015f7b8" style:font-size-asian="18pt" style:font-weight-asian="bold" style:font-size-complex="18pt" style:font-weight-complex="bold"/>
    </style:style>
    <style:style style:name="P5" style:family="paragraph" style:parent-style-name="Standard">
      <style:text-properties fo:font-size="18pt" fo:font-weight="bold" officeooo:rsid="0015f7b8" officeooo:paragraph-rsid="0015f7b8" style:font-size-asian="18pt" style:font-weight-asian="bold" style:font-size-complex="18pt" style:font-weight-complex="bold"/>
    </style:style>
    <style:style style:name="P6" style:family="paragraph" style:parent-style-name="Standard">
      <style:paragraph-properties fo:break-before="page"/>
      <style:text-properties fo:font-size="18pt" fo:font-weight="bold" officeooo:rsid="000bacaa" officeooo:paragraph-rsid="000bacaa" style:font-size-asian="18pt" style:font-weight-asian="bold" style:font-size-complex="18pt" style:font-weight-complex="bold"/>
    </style:style>
    <style:style style:name="P7" style:family="paragraph" style:parent-style-name="Standard">
      <style:text-properties fo:font-size="12pt" fo:font-weight="normal" officeooo:rsid="000fe65b" officeooo:paragraph-rsid="0015f7b8" style:font-size-asian="10.5pt" style:font-weight-asian="normal" style:font-size-complex="12pt" style:font-weight-complex="normal"/>
    </style:style>
    <style:style style:name="P8" style:family="paragraph" style:parent-style-name="Standard">
      <style:text-properties fo:font-size="12pt" fo:font-weight="normal" officeooo:rsid="000c7f66" officeooo:paragraph-rsid="000c7f66" style:font-size-asian="10.5pt" style:font-weight-asian="normal" style:font-size-complex="12pt" style:font-weight-complex="normal"/>
    </style:style>
    <style:style style:name="P9" style:family="paragraph" style:parent-style-name="Standard">
      <style:text-properties fo:font-size="12pt" fo:font-weight="normal" officeooo:rsid="000ce0a6" officeooo:paragraph-rsid="000ce0a6" style:font-size-asian="10.5pt" style:font-weight-asian="normal" style:font-size-complex="12pt" style:font-weight-complex="normal"/>
    </style:style>
    <style:style style:name="P10" style:family="paragraph" style:parent-style-name="Standard">
      <style:text-properties fo:font-size="12pt" fo:font-weight="normal" officeooo:rsid="000e376b" officeooo:paragraph-rsid="000e376b"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0fe65b" officeooo:paragraph-rsid="000fe65b"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11dac5" officeooo:paragraph-rsid="0011dac5"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126198" officeooo:paragraph-rsid="00126198"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12a74d" officeooo:paragraph-rsid="0012a74d" style:font-size-asian="10.5pt" style:font-weight-asian="normal" style:font-size-complex="12pt" style:font-weight-complex="normal"/>
    </style:style>
    <style:style style:name="P15" style:family="paragraph" style:parent-style-name="Standard">
      <style:text-properties fo:font-size="12pt" style:text-underline-style="solid" style:text-underline-width="auto" style:text-underline-color="font-color" fo:font-weight="normal" officeooo:rsid="0025d63e" officeooo:paragraph-rsid="0025d63e"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25d63e" officeooo:paragraph-rsid="0025d63e" style:font-size-asian="10.5pt" style:font-weight-asian="normal" style:font-size-complex="12pt" style:font-weight-complex="normal"/>
    </style:style>
    <style:style style:name="P17" style:family="paragraph" style:parent-style-name="Standard">
      <style:text-properties fo:font-size="12pt" style:text-underline-style="solid" style:text-underline-width="auto" style:text-underline-color="font-color" fo:font-weight="normal" officeooo:rsid="0012a74d" officeooo:paragraph-rsid="0012a74d" style:font-size-asian="10.5pt" style:font-weight-asian="normal" style:font-size-complex="12pt" style:font-weight-complex="normal"/>
    </style:style>
    <style:style style:name="P18" style:family="paragraph" style:parent-style-name="Standard" style:master-page-name="">
      <style:paragraph-properties style:page-number="auto" fo:break-before="auto" fo:break-after="auto"/>
      <style:text-properties fo:font-size="12pt" style:text-underline-style="none" fo:font-weight="normal" officeooo:rsid="0012a74d" officeooo:paragraph-rsid="0012a74d"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013e50c" officeooo:paragraph-rsid="0013e50c"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154179" officeooo:paragraph-rsid="00154179" style:font-size-asian="10.5pt" style:font-weight-asian="normal" style:font-size-complex="12pt" style:font-weight-complex="normal"/>
    </style:style>
    <style:style style:name="P21" style:family="paragraph" style:parent-style-name="Standard">
      <style:text-properties fo:font-size="12pt" style:text-underline-style="solid" style:text-underline-width="auto" style:text-underline-color="font-color" fo:font-weight="normal" officeooo:rsid="00154179" officeooo:paragraph-rsid="00154179" style:font-size-asian="10.5pt" style:font-weight-asian="normal" style:font-size-complex="12pt" style:font-weight-complex="normal"/>
    </style:style>
    <style:style style:name="P22" style:family="paragraph" style:parent-style-name="Standard">
      <style:text-properties fo:font-size="12pt" style:text-underline-style="none" fo:font-weight="normal" officeooo:rsid="0016b889" officeooo:paragraph-rsid="00154179" style:font-size-asian="10.5pt" style:font-weight-asian="normal" style:font-size-complex="12pt" style:font-weight-complex="normal"/>
    </style:style>
    <style:style style:name="P23" style:family="paragraph" style:parent-style-name="Standard">
      <style:text-properties fo:font-size="12pt" style:text-underline-style="none" fo:font-weight="normal" officeooo:rsid="001d668e" officeooo:paragraph-rsid="001d668e" style:font-size-asian="10.5pt" style:font-weight-asian="normal" style:font-size-complex="12pt" style:font-weight-complex="normal"/>
    </style:style>
    <style:style style:name="P24" style:family="paragraph" style:parent-style-name="Standard">
      <style:text-properties fo:font-size="12pt" style:text-underline-style="none" fo:font-weight="normal" officeooo:rsid="0016b889" officeooo:paragraph-rsid="0016b889" style:font-size-asian="10.5pt" style:font-weight-asian="normal" style:font-size-complex="12pt" style:font-weight-complex="normal"/>
    </style:style>
    <style:style style:name="P25" style:family="paragraph" style:parent-style-name="Standard">
      <style:text-properties fo:font-size="12pt" style:text-underline-style="none" fo:font-weight="normal" officeooo:rsid="001be709" officeooo:paragraph-rsid="001be709" style:font-size-asian="10.5pt" style:font-weight-asian="normal" style:font-size-complex="12pt" style:font-weight-complex="normal"/>
    </style:style>
    <style:style style:name="P26" style:family="paragraph" style:parent-style-name="Standard">
      <style:text-properties fo:font-size="12pt" style:text-underline-style="none" fo:font-weight="normal" officeooo:rsid="001dac1a" officeooo:paragraph-rsid="001dac1a" style:font-size-asian="10.5pt" style:font-weight-asian="normal" style:font-size-complex="12pt" style:font-weight-complex="normal"/>
    </style:style>
    <style:style style:name="P27" style:family="paragraph" style:parent-style-name="Standard">
      <style:text-properties fo:font-size="12pt" style:text-underline-style="none" fo:font-weight="normal" officeooo:rsid="001efec6" officeooo:paragraph-rsid="001efec6" style:font-size-asian="10.5pt" style:font-weight-asian="normal" style:font-size-complex="12pt" style:font-weight-complex="normal"/>
    </style:style>
    <style:style style:name="P28" style:family="paragraph" style:parent-style-name="Standard">
      <style:paragraph-properties fo:break-before="page"/>
      <style:text-properties fo:font-size="12pt" style:text-underline-style="solid" style:text-underline-width="auto" style:text-underline-color="font-color" fo:font-weight="normal" officeooo:rsid="001efec6" officeooo:paragraph-rsid="001efec6" style:font-size-asian="10.5pt" style:font-weight-asian="normal" style:font-size-complex="12pt" style:font-weight-complex="normal"/>
    </style:style>
    <style:style style:name="P29" style:family="paragraph" style:parent-style-name="Standard">
      <style:text-properties fo:font-size="12pt" style:text-underline-style="none" fo:font-weight="normal" officeooo:rsid="001fa45d" officeooo:paragraph-rsid="001fa45d" style:font-size-asian="10.5pt" style:font-weight-asian="normal" style:font-size-complex="12pt" style:font-weight-complex="normal"/>
    </style:style>
    <style:style style:name="P30" style:family="paragraph" style:parent-style-name="Standard">
      <style:text-properties fo:font-size="12pt" style:text-underline-style="none" fo:font-weight="normal" officeooo:rsid="00285c5f" officeooo:paragraph-rsid="00285c5f" style:font-size-asian="10.5pt" style:font-weight-asian="normal" style:font-size-complex="12pt" style:font-weight-complex="normal"/>
    </style:style>
    <style:style style:name="P31" style:family="paragraph" style:parent-style-name="Standard">
      <style:text-properties fo:font-size="12pt" style:text-underline-style="none" fo:font-weight="normal" officeooo:rsid="00217147" officeooo:paragraph-rsid="001fa45d" style:font-size-asian="10.5pt" style:font-weight-asian="normal" style:font-size-complex="12pt" style:font-weight-complex="normal"/>
    </style:style>
    <style:style style:name="P32" style:family="paragraph" style:parent-style-name="Standard">
      <style:text-properties fo:font-size="12pt" style:text-underline-style="none" fo:font-weight="normal" officeooo:rsid="002a3ae8" officeooo:paragraph-rsid="002a3ae8" style:font-size-asian="10.5pt" style:font-weight-asian="normal" style:font-size-complex="12pt" style:font-weight-complex="normal"/>
    </style:style>
    <style:style style:name="P33" style:family="paragraph" style:parent-style-name="Standard">
      <style:paragraph-properties fo:break-before="page"/>
      <style:text-properties fo:font-size="12pt" style:text-underline-style="solid" style:text-underline-width="auto" style:text-underline-color="font-color" fo:font-weight="normal" officeooo:rsid="002b7054" officeooo:paragraph-rsid="002b7054" style:font-size-asian="10.5pt" style:font-weight-asian="normal" style:font-size-complex="12pt" style:font-weight-complex="normal"/>
    </style:style>
    <style:style style:name="P34" style:family="paragraph" style:parent-style-name="Standard">
      <style:text-properties fo:font-size="12pt" style:text-underline-style="none" fo:font-weight="normal" officeooo:rsid="002cdbad" officeooo:paragraph-rsid="002cdbad" style:font-size-asian="10.5pt" style:font-weight-asian="normal" style:font-size-complex="12pt" style:font-weight-complex="normal"/>
    </style:style>
    <style:style style:name="P35" style:family="paragraph" style:parent-style-name="Standard">
      <style:text-properties fo:font-size="12pt" style:text-underline-style="none" fo:font-weight="bold" officeooo:rsid="00305b81" officeooo:paragraph-rsid="00305b81" style:font-size-asian="10.5pt" style:font-weight-asian="bold" style:font-size-complex="12pt" style:font-weight-complex="bold"/>
    </style:style>
    <style:style style:name="P36" style:family="paragraph" style:parent-style-name="Standard">
      <style:text-properties fo:font-size="12pt" style:text-underline-style="none" fo:font-weight="normal" officeooo:rsid="00305b81" officeooo:paragraph-rsid="00305b81" style:font-size-asian="10.5pt" style:font-weight-asian="normal" style:font-size-complex="12pt" style:font-weight-complex="normal"/>
    </style:style>
    <style:style style:name="P37" style:family="paragraph" style:parent-style-name="Standard">
      <style:text-properties fo:font-size="12pt" style:text-underline-style="none" fo:font-weight="bold" officeooo:rsid="00314e42" officeooo:paragraph-rsid="00314e42" style:font-size-asian="10.5pt" style:font-weight-asian="bold" style:font-size-complex="12pt" style:font-weight-complex="bold"/>
    </style:style>
    <style:style style:name="P38" style:family="paragraph" style:parent-style-name="Standard">
      <style:text-properties officeooo:paragraph-rsid="00321830"/>
    </style:style>
    <style:style style:name="P39" style:family="paragraph" style:parent-style-name="Standard">
      <style:text-properties fo:font-variant="normal" fo:text-transform="none" fo:color="#000000" loext:opacity="100%" style:font-name="Liberation Serif" fo:font-size="12pt" fo:letter-spacing="normal" fo:font-style="normal" fo:font-weight="normal" officeooo:rsid="00348369" officeooo:paragraph-rsid="00348369" style:font-size-asian="12pt" style:font-size-complex="12pt"/>
    </style:style>
    <style:style style:name="P40" style:family="paragraph" style:parent-style-name="Standard">
      <style:text-properties fo:font-variant="normal" fo:text-transform="none" fo:color="#000000" loext:opacity="100%" style:font-name="Liberation Serif" fo:font-size="12pt" fo:letter-spacing="normal" fo:font-style="normal" fo:font-weight="normal" officeooo:rsid="00363a7d" officeooo:paragraph-rsid="00363a7d" style:font-size-asian="12pt" style:font-size-complex="12pt"/>
    </style:style>
    <style:style style:name="T1" style:family="text">
      <style:text-properties style:text-underline-style="solid" style:text-underline-width="auto" style:text-underline-color="font-color"/>
    </style:style>
    <style:style style:name="T2" style:family="text">
      <style:text-properties style:text-underline-style="none" officeooo:rsid="000bacaa"/>
    </style:style>
    <style:style style:name="T3" style:family="text">
      <style:text-properties officeooo:rsid="000bacaa"/>
    </style:style>
    <style:style style:name="T4" style:family="text">
      <style:text-properties officeooo:rsid="0024f4a8"/>
    </style:style>
    <style:style style:name="T5" style:family="text">
      <style:text-properties officeooo:rsid="000ce0a6"/>
    </style:style>
    <style:style style:name="T6" style:family="text">
      <style:text-properties officeooo:rsid="0025d63e"/>
    </style:style>
    <style:style style:name="T7" style:family="text">
      <style:text-properties officeooo:rsid="000fe65b"/>
    </style:style>
    <style:style style:name="T8" style:family="text">
      <style:text-properties officeooo:rsid="0011dac5"/>
    </style:style>
    <style:style style:name="T9" style:family="text">
      <style:text-properties officeooo:rsid="0013e50c"/>
    </style:style>
    <style:style style:name="T10" style:family="text">
      <style:text-properties officeooo:rsid="00154179"/>
    </style:style>
    <style:style style:name="T11" style:family="text">
      <style:text-properties style:text-underline-style="none"/>
    </style:style>
    <style:style style:name="T12" style:family="text">
      <style:text-properties style:text-underline-style="none" officeooo:rsid="0016b889"/>
    </style:style>
    <style:style style:name="T13" style:family="text">
      <style:text-properties style:text-underline-style="none" officeooo:rsid="001d13c6"/>
    </style:style>
    <style:style style:name="T14" style:family="text">
      <style:text-properties style:text-underline-style="none" officeooo:rsid="0025d63e"/>
    </style:style>
    <style:style style:name="T15" style:family="text">
      <style:text-properties officeooo:rsid="0018750b"/>
    </style:style>
    <style:style style:name="T16" style:family="text">
      <style:text-properties officeooo:rsid="0018823d"/>
    </style:style>
    <style:style style:name="T17" style:family="text">
      <style:text-properties officeooo:rsid="0027146a"/>
    </style:style>
    <style:style style:name="T18" style:family="text">
      <style:text-properties officeooo:rsid="001a650e"/>
    </style:style>
    <style:style style:name="T19" style:family="text">
      <style:text-properties officeooo:rsid="001be709"/>
    </style:style>
    <style:style style:name="T20" style:family="text">
      <style:text-properties style:text-underline-style="none" officeooo:rsid="001fa45d"/>
    </style:style>
    <style:style style:name="T21" style:family="text">
      <style:text-properties style:text-underline-style="none" officeooo:rsid="0020732e"/>
    </style:style>
    <style:style style:name="T22" style:family="text">
      <style:text-properties officeooo:rsid="0020732e"/>
    </style:style>
    <style:style style:name="T23" style:family="text">
      <style:text-properties officeooo:rsid="002262c1"/>
    </style:style>
    <style:style style:name="T24" style:family="text">
      <style:text-properties officeooo:rsid="00242712"/>
    </style:style>
    <style:style style:name="T25" style:family="text">
      <style:text-properties officeooo:rsid="002b7054"/>
    </style:style>
    <style:style style:name="T26" style:family="text">
      <style:text-properties style:text-underline-style="none" officeooo:rsid="002cdbad"/>
    </style:style>
    <style:style style:name="T27" style:family="text">
      <style:text-properties officeooo:rsid="002ee9b7"/>
    </style:style>
    <style:style style:name="T28" style:family="text">
      <style:text-properties officeooo:rsid="00305b81"/>
    </style:style>
    <style:style style:name="T29" style:family="text">
      <style:text-properties officeooo:rsid="00314e42"/>
    </style:style>
    <style:style style:name="T30" style:family="text">
      <style:text-properties fo:font-size="12pt" style:text-underline-style="none" fo:font-weight="normal" officeooo:rsid="00321830" style:font-size-asian="10.5pt" style:font-weight-asian="normal" style:font-size-complex="12pt" style:font-weight-complex="normal"/>
    </style:style>
    <style:style style:name="T31" style:family="text">
      <style:text-properties fo:font-size="12pt" style:text-underline-style="none" fo:font-weight="normal" officeooo:rsid="0032b250" style:font-size-asian="10.5pt" style:font-weight-asian="normal" style:font-size-complex="12pt" style:font-weight-complex="normal"/>
    </style:style>
    <style:style style:name="T32" style:family="text">
      <style:text-properties fo:font-variant="normal" fo:text-transform="none" fo:color="#000099" loext:opacity="100%" style:font-name="Liberation Serif" fo:font-size="12pt" fo:letter-spacing="normal" fo:font-style="normal" fo:font-weight="normal" style:font-size-asian="12pt" style:font-size-complex="12pt"/>
    </style:style>
    <style:style style:name="T33" style:family="text">
      <style:text-properties officeooo:rsid="0032b250"/>
    </style:style>
    <style:style style:name="T34"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35" style:family="text">
      <style:text-properties fo:font-variant="normal" fo:text-transform="none" fo:color="#000000" loext:opacity="100%" style:font-name="Liberation Serif" fo:font-size="12pt" fo:letter-spacing="normal" fo:font-style="normal" fo:font-weight="normal" officeooo:rsid="0032b250" style:font-size-asian="12pt" style:font-size-complex="12pt"/>
    </style:style>
    <style:style style:name="T36" style:family="text">
      <style:text-properties fo:color="#000099" loext:opacity="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2"/>
      <text:p text:style-name="P3">PROYECTO INTERMODULAR DE 1º</text:p>
      <text:p text:style-name="P3"/>
      <text:p text:style-name="P3">TÉCNICO SUPERIOR EN DESARROLLO</text:p>
      <text:p text:style-name="P3">EN APLICACIONES WEB</text:p>
      <text:p text:style-name="P3"/>
      <text:p text:style-name="P3">SITEMAS INFORMATICOS</text:p>
      <text:p text:style-name="P3"/>
      <text:p text:style-name="P3">(Hecho por Cristian Adasme Contreras)</text:p>
      <text:p text:style-name="P4">Indice</text:p>
      <text:p text:style-name="P5"/>
      <text:p text:style-name="P6">Entorno de ejecución de aplicaciones Java.</text:p>
      <text:p text:style-name="P7"><text:span text:style-name="T1">3.1</text:span><text:span text:style-name="T2"> </text:span><text:span text:style-name="T3">La JVM es un programa el cual permite ejecutar Java en diferentes sistemas operativos. Esta es una parte de lo que engloba a la JDK, </text:span><text:span text:style-name="T4">ya que necesita un sistema que interprete y ejecute codigo</text:span><text:span text:style-name="T3">.</text:span></text:p>
      <text:p text:style-name="P8">Se traduce a bytecode gracias al compilador <text:span text:style-name="T5">JIT </text:span>para que JVM lo pueda entender y este interactuar con los sistemas operativos.</text:p>
      <text:p text:style-name="P8">Todo esto se guarda en el Class Loader. La clase .class que carga los archivos de bytecode <text:span text:style-name="T4">con clases que son necesarias</text:span>.</text:p>
      <text:p text:style-name="P9">Estos conecta con la JVM memory que son diferentes áreas <text:span text:style-name="T6">donde se almacena todo</text:span>.</text:p>
      <text:p text:style-name="P10">Después estaría el Execution Engine que es el componente central de la JVM ya que comunica con varias áreas de memoria de toda la JVM <text:span text:style-name="T4">ejecutando instrucciones para el programa</text:span>.</text:p>
      <text:p text:style-name="P10">Sigue la JNI que permite interpretar lenguajes que no sean propios de Java.</text:p>
      <text:p text:style-name="P10">Y por ultimo las Native Method Libraries <text:span text:style-name="T7">hacen los mismo pero con librerías.</text:span></text:p>
      <text:p text:style-name="P11">JRE: Se ejecuta sobre el sistema operativo y proporciona librerías y clases <text:span text:style-name="T8">propias</text:span> que Java necesita. <text:span text:style-name="T8">Esto hace que solo cargue las clases necesarios del ClassLoader del JVM, automatizando la eficien</text:span><draw:frame draw:style-name="fr1" draw:name="Imagen1" text:anchor-type="char" svg:x="1.572cm" svg:y="0.462cm" svg:width="13.481cm" svg:height="7.35cm" draw:z-index="0"><draw:image xlink:href="Pictures/10000000000002DA000001BAA87C960F.png" xlink:type="simple" xlink:show="embed" xlink:actuate="onLoad" draw:mime-type="image/png"/></draw:frame><text:span text:style-name="T8">cia </text:span><text:span text:style-name="T6">a la hora de la ejecución</text:span><text:span text:style-name="T8">.</text:span></text:p>
      <text:p text:style-name="P12">Tiene un verificador de bytecode que mira si viola la integridad del sistema o derechos de acceso. Al detectar esto la clase se considerada dañada y no cargara. Si el bytecode es cargado correctamente se pasara al interprete.</text:p>
      <text:p text:style-name="P12">Esta ultima crea una instancia de la JVM que permite conectarse con la maquina en la que este.</text:p>
      <text:p text:style-name="P12"/>
      <text:p text:style-name="P13">JDK: La JDK (Java development kit) es la base todo englobando JRE y JVM.</text:p>
      <text:p text:style-name="P13">Este hace uso de las herramientas de desarrollo (Development tools). Lo que hace esta es compilar con Java Compiler, depurar con Java Debugger, entre otros como ejecutar el programa utilizando la plataforma Java.</text:p>
      <text:p text:style-name="P12"><draw:frame draw:style-name="fr1" draw:name="Imagen2" text:anchor-type="char" svg:x="-0.25cm" svg:y="0.071cm" svg:width="7.444cm" svg:height="3.722cm" draw:z-index="1"><draw:image xlink:href="Pictures/100000000000032000000190A84B367B.png" xlink:type="simple" xlink:show="embed" xlink:actuate="onLoad" draw:mime-type="image/png"/></draw:frame></text:p>
      <text:p text:style-name="P14">JDK es perfecta para el desarrollo mientras que JRE es perfecta para la ejecución.</text:p>
      <text:p text:style-name="P14">Ya que la JDK hace uso de las herramientas de desarrollador y JRE hace que el programa se ejecute sobre el mismo sistema operativo y proporcione las clases necesarias para que la ejecución sea mas fluida.</text:p>
      <text:p text:style-name="P14"/>
      <text:p text:style-name="P14"><text:soft-page-break/></text:p>
      <text:p text:style-name="P15">Instalación JAVA</text:p>
      <text:p text:style-name="P16"/>
      <text:p text:style-name="P17"/>
      <text:p text:style-name="P17">Variables</text:p>
      <text:p text:style-name="P18">JAVA_HOME: Muestra donde se encuentra situado JAVA en nuestro dispositivo. <text:span text:style-name="T9">En variables de entorno se pone el nombre de la variable que en este caso es JAVA_HOME y la ruta donde se encuentre instalado JAVA. </text:span></text:p>
      <text:p text:style-name="P19">PATH: Muestra archivos que son de uso para JAVA <text:span text:style-name="T10">como compiladores y interpretes, principalmente de los ejecutables bin. Se añaden de la misma manera en la que se le asigna la ruta a JAVA_HOME.</text:span></text:p>
      <text:p text:style-name="P19"/>
      <text:p text:style-name="P20">Sin estas variables los programas no sabrian donde estan estas rutas y ocurrian erores como que no se ha encontrado.</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oft-page-break/></text:p>
      <text:p text:style-name="P21">3.2<text:span text:style-name="T11"> </text:span><text:span text:style-name="T12">Los instaladores </text:span><text:span text:style-name="T13">son programas que facilitan la instalación de Softwares que de por si serian </text:span><text:span text:style-name="T14">mas complejos</text:span><text:span text:style-name="T13"> de instalar sin planteamiento previo. Estos haces que los archivos se automatizan para contener todas las dependencias y recursos que necesite el programa. Usualmente estos los convierten en ejecutables para los diferentes sistemas operativos como .exe para Windows, .dmg para macOS y .dep para Linux</text:span><text:span text:style-name="T12">.</text:span></text:p>
      <text:p text:style-name="P22"/>
      <text:p text:style-name="P23">Sus ventajas ante enviar un comprimido o un .jar es que el usuario que lo descargues lo tendrá mas fácil ya que no tendrá que descargar cosas como el JDK o dependencias que el .jar use, ya que sera automatico. Ademas que serán guiados a través del proceso de instalación dándoles todo lo necesario para que el programa funcione.</text:p>
      <text:p text:style-name="P22"/>
      <text:p text:style-name="P24">Algunos instaladores mas usados son:</text:p>
      <text:p text:style-name="P24">-Inno Setup: <text:span text:style-name="T15">Instalador de Windows </text:span><text:span text:style-name="T6">gratuito </text:span><text:span text:style-name="T15">usado para convertirlos en archivos .exe</text:span></text:p>
      <text:p text:style-name="P24"/>
      <text:p text:style-name="P24">-install4j: <text:span text:style-name="T16">Instalador multi plataforma que gracias a una interfaz gráfica intuitiva para el usuario la creación de instaladores. </text:span><text:span text:style-name="T17">Ademas de detectar o incluir una version de JAVA cualquiera.</text:span></text:p>
      <text:p text:style-name="P24"/>
      <text:p text:style-name="P24">-Jpackage: <text:span text:style-name="T16">Herramienta de linea de comandos del propio JDK que </text:span><text:span text:style-name="T18">con una aplicación JAVA y la imagen de tiempo de ejecución para que se hagan programas que ya tengan todas las dependencias necesarias. Es multiplataforma Windows y macOS.</text:span></text:p>
      <text:p text:style-name="P24"/>
      <text:p text:style-name="P24">-Launch4j: <text:span text:style-name="T18">Es una herramienta multi plataforma gratis que funciona principalmente para empaquetar aplicaciones JAVA que </text:span><text:span text:style-name="T19">están en .jar. Este une el archivo .jar y el .exe en un mismo archivo al contrario de otros instaladores.</text:span></text:p>
      <text:p text:style-name="P24"/>
      <text:p text:style-name="P25">Elementos de un instalador:</text:p>
      <text:p text:style-name="P26">Los archivos de la aplicación son todos los archivos esenciales que convertirlo en instalador se guardan dentro del nuevo programa instalado. En este caso ya sean el .jar, librerias entre mas.</text:p>
      <text:p text:style-name="P26">Los accesos directos son los ejecutables que vienen junto con el instalador. Estos son los puntos de uso ya que los puedes poner en el escritorio para acceder al programa desde el propio escritorio.</text:p>
      <text:p text:style-name="P26">La configuración inicial es el método con el cual al principio de un instalador se nos descargan todos los recursos necesarios que necesita el programa para funcionar automáticamente.</text:p>
      <text:p text:style-name="P27">Las dependencias de JRE o librerías de tercero. El instalador ve si estan han sido correctamente instaladas.</text:p>
      <text:p text:style-name="P27">Los des instaladores permiten tras borrar un programa, borrar todos los archivos que fueron necesarios para ese programa. Para eso se necesita borrarlo de una manera especifica.</text:p>
      <text:p text:style-name="P27">La ruta de instalación es donde se guardara el archivo.</text:p>
      <text:p text:style-name="P28">3.3<text:span text:style-name="T11"> </text:span><text:span text:style-name="T20">Las APIs (Application Programming Interface) son </text:span><text:span text:style-name="T21">un conjunto de reglas y protocolos</text:span><text:span text:style-name="T20"> que permiten a dos componentes de software interactuar entre ellos.</text:span></text:p>
      <text:p text:style-name="P29">Estas pueden ser vistas en modelo cliente servidor. Donde el primer componente (Cliente) es uno que pide <text:span text:style-name="T22">datos o acciones</text:span> a otro componente (Servidor).</text:p>
      <text:p text:style-name="P30">Estan tambien pueden dividirse en backend y frontend, siendo backend la parte de datos de una aplicación y frontend la parte mas visual.<draw:frame draw:style-name="fr2" draw:name="Imagen3" text:anchor-type="char" svg:width="17cm" svg:height="9.562cm" draw:z-index="2"><draw:image xlink:href="Pictures/10000000000007800000043810A270F1.png" xlink:type="simple" xlink:show="embed" xlink:actuate="onLoad" draw:mime-type="image/png"/></draw:frame></text:p>
      <text:p text:style-name="P30"/>
      <text:p text:style-name="P30">API Rest: Representational State Transfer. Es una API con protocolo web que permite conectar programas a traves de HTTP</text:p>
      <text:p text:style-name="P29"/>
      <text:p text:style-name="P31">Spring Boot es <text:span text:style-name="T23">un framework que ayuda con el desarrollo de aplicaciones web, APIs REST y micro servicios. </text:span><text:span text:style-name="T24">Spring Boot suele resultar buena para las APIs porque ya que permite hacer aplicaciones basadas en String sin mucha configuración y listas para ejecutar.</text:span></text:p>
      <text:p text:style-name="P31"/>
      <text:p text:style-name="P32">Conceptos relacionados con API:</text:p>
      <text:p text:style-name="P32"/>
      <text:p text:style-name="P32">Dirección IP: Es un identificador de un equipo dentro de la red.</text:p>
      <text:p text:style-name="P32">Puerto:<text:tab/>Es dirección por donde se accede a servicios en concreto.</text:p>
      <text:p text:style-name="P32">Protocolo HTTP/HTTPS: Es la comunicación entre un cliente y un servidor. Donde el cliente recibe peticiones y el servidor da respuestas. En el caso de HTTPS cifra la información enviada.</text:p>
      <text:p text:style-name="P32">GET: Es <text:span text:style-name="T25">un comando para pedir información al servidor.</text:span></text:p>
      <text:p text:style-name="P32">POST: <text:span text:style-name="T25">Es un comando para enviar información al servidor.</text:span></text:p>
      <text:p text:style-name="P32">Respuesta del servidor: <text:span text:style-name="T25">Tras recibir las peticiones el servidor devuelve respuesta. Ya sean de datos, mensajes, cogido señalando si ha funcionado o no.</text:span></text:p>
      <text:p text:style-name="P32"/>
      <text:p text:style-name="P33">3.4<text:span text:style-name="T11"> </text:span><text:span text:style-name="T26">El Docker es una plataforma de código abierto que permite a los desarrolladores, crear, implementar, ejecutar, actualizar y gestionar aplicaciones en contenedores. Estas son unidades ejecutables de software que el código con las bibliotecas e independencias.</text:span></text:p>
      <text:p text:style-name="P34">Los contenedores a la vez son beneficiados de una forma de visualización del sistema operativo.</text:p>
      <text:p text:style-name="P34"/>
      <text:p text:style-name="P34">Lo que el Docker resuelve es el común fallo de que un programa no funcione en otro equipo ya sea por configuración diferente, dependencias y entre otras cosas. Ya que este hace que se ejecute de forma parecida en otros entornos.</text:p>
      <text:p text:style-name="P34"/>
      <text:p text:style-name="P34">Mientras que la maquina virtual <text:span text:style-name="T27">es mas pesada ya que </text:span>simul<text:span text:style-name="T27">a</text:span> el sistema operativo completo <text:span text:style-name="T27">al ser</text:span> una copia virtual del hardware del SO. En cambio los contenedores <text:span text:style-name="T27">son rápidos y ligeros,</text:span> <text:span text:style-name="T27">haciendo que </text:span>devuelv<text:span text:style-name="T27">a</text:span>n el sistema operativo para que los contenedores contengan <text:span text:style-name="T27">solo </text:span>la aplicación con bibliotecas y dependencias. <text:span text:style-name="T28">Esto hace que las maquinas virtuales consuman muchos mas recursos innecesarios haciendo a los contenedores mejor adecuados para la materia.</text:span></text:p>
      <text:p text:style-name="P34"/>
      <text:p text:style-name="P35">Conceptos basicos.</text:p>
      <text:p text:style-name="P36">Imagen: Plantilla la cual contiene lo necesario para crear el contenedor.</text:p>
      <text:p text:style-name="P36">Dockerfile: <text:span text:style-name="T29">Archivo con información necesario para saber como construir la imagen Docker.</text:span></text:p>
      <text:p text:style-name="P36">Volumen: <text:span text:style-name="T29">Almacenador de datos afuera del propio contenedor. Esto se usa para almacenar datos que no convienen que se pierdan a lar hora de que el contenedor se elimine.</text:span></text:p>
      <text:p text:style-name="P36">Puerto expuesto: <text:span text:style-name="T29">Permite acceder a la aplicacion desde fuera del contenedor. Este se puede usando los puertos de esta.</text:span></text:p>
      <text:p text:style-name="P36"/>
      <text:p text:style-name="P37">La relación Docker y Spring Boot</text:p>
      <text:p text:style-name="P38"><text:span text:style-name="T30">Primero se haria un .jar con Spring Boot. </text:span><text:span text:style-name="T31">Se hace una publicación cualquiera donde se importan varias clases para el Spring Boot ademas de @s </text:span><text:span text:style-name="T32">@SpringBootApplication</text:span> <text:span text:style-name="T33">y </text:span><text:span text:style-name="T32">@RestController</text:span><text:span text:style-name="T34">. </text:span><text:span text:style-name="T35">Haciendolo mas funcional para manejar peticiones de web.</text:span></text:p>
      <text:p text:style-name="P39">Un <text:span text:style-name="T36">@RequestMapping </text:span>que asigna la ruta / al método que queramos ponerle para que envié como respuesta lo que haga.</text:p>
      <text:p text:style-name="P39">Por ultimo el main() usa el metodo SpringApplication.run() para lanzar aplicación.</text:p>
      <text:p text:style-name="P40">Se escribe el Dockedrfile donde almacenamos toda la información necesaria. A continuación se hace una imagen con lo necesario para ejecutar la imagen como contenedor.</text:p>
      <text:p text:style-name="P40">Ahi la aplicación ya estaria disponible en un puerto con el cual solo que habria que ejecutar en comando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2a6099" loext:opacity="100%" fo:font-weight="bold" officeooo:rsid="0015f7b8" officeooo:paragraph-rsid="0015f7b8" style:font-weight-asian="bold" style:font-weight-complex="bold"/>
    </style:style>
    <style:style style:name="MT1" style:family="text">
      <style:text-properties fo:color="#2a6099" loext:opacity="100%" officeooo:rsid="0015f7b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AW<text:tab/>Proyecto Intermodular<text:tab/>Cristian Adasme Contreras</text:p>
      </style:header>
      <style:footer>
        <text:p text:style-name="Footer"><text:tab/><text:tab/><text:span text:style-name="MT1">Pag: </text:span><text:span text:style-name="MT1"><text:page-number text:select-page="current">6</text:page-number></text:span></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2T09:40:12.230223500</meta:creation-date>
    <meta:editing-duration>PT35M34S</meta:editing-duration>
    <meta:editing-cycles>5</meta:editing-cycles>
    <meta:generator>LibreOffice/25.8.1.1$Windows_X86_64 LibreOffice_project/54047653041915e595ad4e45cccea684809c77b5</meta:generator>
    <dc:date>2026-05-14T14:29:04.375152600</dc:date>
    <meta:document-statistic meta:table-count="0" meta:image-count="3" meta:object-count="0" meta:page-count="7" meta:paragraph-count="69" meta:word-count="1437" meta:character-count="8872" meta:non-whitespace-character-count="7501"/>
  </office:meta>
</office:document-meta>
</file>